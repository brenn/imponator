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3A000002B63697D8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0.2681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81">
      <style:table-cell-properties fo:border="0.74pt solid #000000"/>
    </style:style>
    <style:style style:name="ce7" style:family="table-cell" style:parent-style-name="Default" style:data-style-name="N81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81"/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Vdd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V</text:p>
          </table:table-cell>
          <table:table-cell table:style-name="ce8" table:number-columns-repeated="3"/>
          <table:table-cell table:style-name="ce5" table:number-columns-repeated="2"/>
          <table:table-cell>
            <draw:frame draw:z-index="0" draw:name="Image 1" draw:style-name="gr1" draw:text-style-name="P1" svg:width="3.6744in" svg:height="4.3094in" svg:x="0.0453in" svg:y="0in">
              <draw:image xlink:href="Pictures/100000010000023A000002B63697D82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I(led)</text:p>
          </table:table-cell>
          <table:table-cell table:style-name="ce6" office:value-type="float" office:value="0.02" calcext:value-type="float">
            <text:p>2.00E-02</text:p>
          </table:table-cell>
          <table:table-cell table:style-name="ce12" office:value-type="string" calcext:value-type="string">
            <text:p>A</text:p>
          </table:table-cell>
          <table:table-cell table:style-name="ce14" office:value-type="string" calcext:value-type="string" table:number-columns-spanned="5" table:number-rows-spanned="1">
            <text:p>Fully saturated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(led)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V</text:p>
          </table:table-cell>
          <table:table-cell table:style-name="ce13" office:value-type="string" calcext:value-type="string" table:number-columns-spanned="5" table:number-rows-spanned="1">
            <text:p>Wurth datasheet, 2600 mCa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Beta 3904</text:p>
          </table:table-cell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3" table:number-columns-spanned="5" table:number-rows-spanned="1"/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e</text:p>
          </table:table-cell>
          <table:table-cell table:style-name="ce5" office:value-type="float" office:value="0.7" calcext:value-type="float">
            <text:p>0.7</text:p>
          </table:table-cell>
          <table:table-cell table:style-name="ce12" office:value-type="string" calcext:value-type="string">
            <text:p>V</text:p>
          </table:table-cell>
          <table:table-cell table:style-name="ce13" table:number-columns-spanned="5" table:number-rows-spanned="1"/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ce</text:p>
          </table:table-cell>
          <table:table-cell table:style-name="ce5" office:value-type="float" office:value="0.2" calcext:value-type="float">
            <text:p>0.2</text:p>
          </table:table-cell>
          <table:table-cell table:style-name="ce12" office:value-type="string" calcext:value-type="string">
            <text:p>V</text:p>
          </table:table-cell>
          <table:table-cell table:style-name="ce13" office:value-type="string" calcext:value-type="string" table:number-columns-spanned="5" table:number-rows-spanned="1">
            <text:p>voltage drop when I(Q) &gt; 10mA</text:p>
          </table:table-cell>
          <table:covered-table-cell table:number-columns-repeated="2" table:style-name="ce8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b(Q1)</text:p>
          </table:table-cell>
          <table:table-cell table:style-name="ce8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I(led) / beta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2]/[.C4]" office:value-type="float" office:value="0.0002" calcext:value-type="float">
            <text:p>0.0002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(Q1)</text:p>
          </table:table-cell>
          <table:table-cell table:style-name="ce8" office:value-type="string" calcext:value-type="string">
            <text:p>=</text:p>
          </table:table-cell>
          <table:table-cell table:style-name="ce14" office:value-type="string" calcext:value-type="string" table:number-columns-spanned="2" table:number-rows-spanned="1">
            <text:p>Vce(Q1) + V(led) +Vbe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6]+[.C3]+[.C5]" office:value-type="float" office:value="2.9" calcext:value-type="float">
            <text:p>2.9</text:p>
          </table:table-cell>
          <table:table-cell table:style-name="ce5" office:value-type="string" calcext:value-type="string">
            <text:p>V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R1</text:p>
          </table:table-cell>
          <table:table-cell table:style-name="ce8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V(R1) / Ib = (Vdd-Vb) / Ib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0])/[.G9]" office:value-type="float" office:value="10500" calcext:value-type="float">
            <text:p>10500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(8.2k)</text:p>
          </table:table-cell>
          <table:table-cell/>
        </table:table-row>
        <table:table-row table:style-name="ro1" table:number-rows-repeated="2">
          <table:table-cell/>
          <table:table-cell table:style-name="ce1"/>
          <table:table-cell table:style-name="ce8" table:number-columns-repeated="5"/>
          <table:table-cell table:style-name="ce5" table:number-columns-repeated="2"/>
          <table:table-cell/>
        </table:table-row>
        <table:table-row table:style-name="ro1">
          <table:table-cell/>
          <table:table-cell table:style-name="ce1"/>
          <table:table-cell table:style-name="ce8"/>
          <table:table-cell table:style-name="ce13" table:number-columns-spanned="2" table:number-rows-spanned="1"/>
          <table:covered-table-cell table:style-name="ce5"/>
          <table:table-cell table:style-name="ce8" table:number-columns-repeated="2"/>
          <table:table-cell table:style-name="ce5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b(Q9)</text:p>
          </table:table-cell>
          <table:table-cell table:style-name="ce8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(8 * I(led)) / beta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8*[.C2])/[.C4]" office:value-type="float" office:value="0.0016" calcext:value-type="float">
            <text:p>0.0016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Vb(Q9)</text:p>
          </table:table-cell>
          <table:table-cell table:style-name="ce8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Vbe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5]" office:value-type="float" office:value="0.7" calcext:value-type="float">
            <text:p>0.7</text:p>
          </table:table-cell>
          <table:table-cell table:style-name="ce5" office:value-type="string" calcext:value-type="string">
            <text:p>V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R17</text:p>
          </table:table-cell>
          <table:table-cell table:style-name="ce8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(Vdd-Vb(Q9)) / Ib(Q9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6])/[.G15]" office:value-type="float" office:value="2687.5" calcext:value-type="float">
            <text:p>2687.5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(2.7k)</text:p>
          </table:table-cell>
          <table:table-cell/>
        </table:table-row>
        <table:table-row table:style-name="ro1">
          <table:table-cell/>
          <table:table-cell table:style-name="ce1"/>
          <table:table-cell table:style-name="ce5"/>
          <table:table-cell table:style-name="ce8" table:number-columns-repeated="4"/>
          <table:table-cell table:style-name="ce5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c(Q1)</text:p>
          </table:table-cell>
          <table:table-cell table:style-name="ce8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Vce(Q9) + V(led) + Vce(Q1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[.C6]+[.C3]+[.C6]" office:value-type="float" office:value="2.4" calcext:value-type="float">
            <text:p>2.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2</text:p>
          </table:table-cell>
          <table:table-cell table:style-name="ce8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(Vdd – Vc(Q1)) / I(led)</text:p>
          </table:table-cell>
          <table:covered-table-cell table:style-name="ce8"/>
          <table:table-cell table:style-name="ce8" office:value-type="string" calcext:value-type="string">
            <text:p>=</text:p>
          </table:table-cell>
          <table:table-cell table:style-name="ce8" table:formula="of:=([.C1]-[.G19])/[.C2]" office:value-type="float" office:value="130" calcext:value-type="float">
            <text:p>130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float" office:value="-120" calcext:value-type="float">
            <text:p>-12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Frequency Calcula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V1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9" office:value-type="float" office:value="0.0000047" calcext:value-type="float">
            <text:p>4.70E-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ps(min)</text:p>
          </table:table-cell>
          <table:table-cell table:style-name="ce10" office:value-type="string" calcext:value-type="string" table:number-columns-spanned="2" table:number-rows-spanned="1">
            <text:p>=1/( (RV1+R2) * C2) = </text:p>
          </table:table-cell>
          <table:covered-table-cell/>
          <table:table-cell table:style-name="ce17" table:formula="of:=1/(([.C24]+[.C25])*[.C26])" office:value-type="float" office:value="2.03214859070495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s(max)</text:p>
          </table:table-cell>
          <table:table-cell table:style-name="ce10" office:value-type="string" calcext:value-type="string" table:number-columns-spanned="2" table:number-rows-spanned="1">
            <text:p>=1/(R2 * C2) =</text:p>
          </table:table-cell>
          <table:covered-table-cell/>
          <table:table-cell table:style-name="ce17" table:formula="of:=1/([.C25]*[.C26])" office:value-type="float" office:value="45.2693526482571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Refresh f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11" table:formula="of:=1/([.C31]*[.C32])" office:value-type="float" office:value="2127.65957446809" calcext:value-type="float">
            <text:p>212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et de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float" office:value="470000" calcext:value-type="float">
            <text:p>47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9" office:value-type="float" office:value="0.00000039" calcext:value-type="float">
            <text:p>3.90E-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ay</text:p>
          </table:table-cell>
          <table:table-cell table:formula="of:=[.C36]*[.C37]" office:value-type="float" office:value="0.1833" calcext:value-type="float">
            <text:p>0.1833</text:p>
          </table:table-cell>
          <table:table-cell table:style-name="ce16" office:value-type="string" calcext:value-type="string">
            <text:p>s</text:p>
          </table:table-cell>
          <table:table-cell table:number-columns-repeated="6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19:40:41.935500428</meta:creation-date>
    <dc:date>2026-05-02T01:48:01.703700603</dc:date>
    <meta:editing-duration>PT3H57M59S</meta:editing-duration>
    <meta:editing-cycles>3</meta:editing-cycles>
    <meta:generator>LibreOffice/24.2.7.2$Linux_X86_64 LibreOffice_project/420$Build-2</meta:generator>
    <meta:document-statistic meta:table-count="1" meta:cell-count="98" meta:object-count="1"/>
  </office:meta>
</office:document-meta>
</file>